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tyle="italic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T1" style:family="text">
      <style:text-properties style:font-name="Google Sans Text" fo:font-weight="bold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k of Shopify like a security guard watching a door. The "trigger" is the specific event that makes the guard pick up the phone and call your VPS.</text:p>
      <text:section text:style-name="Sect1" text:name="model-response-message-contentr_1673cbf3601322f8">
        <text:p text:style-name="P1">In your code, you’ve set up a listener, but Shopify will only "call" you when one of these specific actions occurs inside the Shopify Admin or on the storefront.</text:p>
        <text:h text:style-name="P2" text:outline-level="3">1. The "Big Three" Triggers</text:h>
        <text:p text:style-name="P1">Since you are focusing on orders, these are the most common triggers you'll use:</text:p>
        <text:list text:style-name="L1">
          <text:list-item>
            <text:p text:style-name="P3"><text:span text:style-name="T1">Order Creation (</text:span><text:span text:style-name="Source_20_Text"><text:span text:style-name="T1">orders/create</text:span></text:span><text:span text:style-name="T1">):</text:span><text:span text:style-name="T2"> This is the "Grand Slam." It triggers the moment a customer clicks "Pay Now" and the payment is authorized. This sends the full JSON package containing the customer info and the "Midnight Blue Mug" details to your </text:span><text:span text:style-name="Source_20_Text"><text:span text:style-name="T2">/webhook</text:span></text:span><text:span text:style-name="T2"> path.</text:span></text:p>
          </text:list-item>
          <text:list-item>
            <text:p text:style-name="P3"><text:span text:style-name="T1">Order Updated (</text:span><text:span text:style-name="Source_20_Text"><text:span text:style-name="T1">orders/updated</text:span></text:span><text:span text:style-name="T1">):</text:span><text:span text:style-name="T2"> This triggers if you change anything about the order later—like adding a note, changing the shipping address, or marking it as "Paid."</text:span></text:p>
          </text:list-item>
          <text:list-item>
            <text:p text:style-name="P3"><text:span text:style-name="T1">Order Fulfillment (</text:span><text:span text:style-name="Source_20_Text"><text:span text:style-name="T1">orders/fulfilled</text:span></text:span><text:span text:style-name="T1">):</text:span><text:span text:style-name="T2"> This hits your server when you click "Mark as Fulfilled" in Shopify. This is the trigger people use to send "Your item has shipped!" emails via Node.js.</text:span></text:p>
          </text:list-item>
        </text:list>
        <text:h text:style-name="P2" text:outline-level="3">2. How to "Pull the Trigger" Manually</text:h>
        <text:p text:style-name="P1">Since you are in development mode, you don't have to wait for a real person. You can force Shopify to hit your webhook in three ways:</text:p>
        <text:list text:style-name="L2">
          <text:list-item>
            <text:p text:style-name="P4"><text:span text:style-name="T3">The Bogus Checkout:</text:span> Go to your store and complete a purchase using the "1" credit card trick we discussed. This is the most "realistic" trigger because it follows the exact path a customer takes.</text:p>
          </text:list-item>
          <text:list-item>
            <text:p text:style-name="P5">The "Send Test Notification" Button:</text:p>
            <text:list>
              <text:list-item>
                <text:p text:style-name="P4">Go to <text:span text:style-name="T3">Settings &gt; Notifications &gt; Webhooks</text:span>.</text:p>
              </text:list-item>
              <text:list-item>
                <text:p text:style-name="P4">Find the webhook you created.</text:p>
              </text:list-item>
              <text:list-item>
                <text:p text:style-name="P4">Click the <text:span text:style-name="T3">"Send test notification"</text:span> link.</text:p>
              </text:list-item>
              <text:list-item>
                <text:p text:style-name="P6">Note: This sends "dummy" data (Example Customer, Example Order) just to see if your VPS logs "🔥 WEBHOOK RECEIVED".</text:p>
              </text:list-item>
            </text:list>
          </text:list-item>
          <text:list-item>
            <text:p text:style-name="P7"><text:span text:style-name="T1">Admin Actions:</text:span><text:span text:style-name="T2"> If you have an </text:span><text:span text:style-name="Source_20_Text"><text:span text:style-name="T2">orders/updated</text:span></text:span><text:span text:style-name="T2"> webhook, simply going into an existing order in your Shopify Admin and adding a "Tag" or a "Note" and hitting </text:span><text:soft-page-break/><text:span text:style-name="T2">save will trigger the hit to your VPS.</text:span></text:p>
          </text:list-item>
        </text:list>
        <text:p text:style-name="Horizontal_20_Line"/>
        <text:h text:style-name="P2" text:outline-level="3">3. The "Silent" Trigger (Inventory)</text:h>
        <text:p text:style-name="P1">As you move toward your <text:span text:style-name="T3">MariaDB</text:span> integration, you might want to look at the <text:span text:style-name="T3">Inventory Levels</text:span> trigger.</text:p>
        <text:list text:style-name="L3">
          <text:list-item>
            <text:p text:style-name="P8"><text:span text:style-name="T2">If you change the stock of your mug from 10 to 9 inside the Shopify Admin, Shopify can hit a webhook (</text:span><text:span text:style-name="Source_20_Text"><text:span text:style-name="T2">inventory_levels/update</text:span></text:span><text:span text:style-name="T2">).</text:span></text:p>
          </text:list-item>
          <text:list-item>
            <text:p text:style-name="P9">Your script receives this, and you can immediately write a MariaDB query to update your local database so your "potato VPS" always knows exactly how many mugs are left.</text:p>
          </text:list-item>
        </text:list>
        <text:h text:style-name="P2" text:outline-level="3">4. Why your Script is "Resting"</text:h>
        <text:p text:style-name="P10"><text:span text:style-name="T2">Your code uses </text:span><text:span text:style-name="Source_20_Text"><text:span text:style-name="T2">http.createServer</text:span></text:span><text:span text:style-name="T2">. In Linux terms, this puts the process into a </text:span><text:span text:style-name="T1">"Sleep"</text:span><text:span text:style-name="T2"> or </text:span><text:span text:style-name="T1">"Wait"</text:span><text:span text:style-name="T2"> state.</text:span></text:p>
        <text:list text:style-name="L4">
          <text:list-item>
            <text:p text:style-name="P11">The Linux Kernel handles the network port (3000).</text:p>
          </text:list-item>
          <text:list-item>
            <text:p text:style-name="P11">Your script uses almost 0% CPU while waiting.</text:p>
          </text:list-item>
          <text:list-item>
            <text:p text:style-name="P11">When the Shopify "Trigger" hits, the Kernel "wakes up" your Node.js process.</text:p>
          </text:list-item>
          <text:list-item>
            <text:p text:style-name="P12"><text:span text:style-name="T2">Your script runs the </text:span><text:span text:style-name="Source_20_Text"><text:span text:style-name="T2">normalizeShopifyOrder</text:span></text:span><text:span text:style-name="T2"> function, logs the data, and then goes right back to sleep.</text:span></text:p>
          </text:list-item>
        </text:list>
        <text:p text:style-name="P1">It’s a very "green" and efficient way to run a server on a potato!</text:p>
        <text:p text:style-name="P13">Are you ready to try the "Send test notification" button to see if your VPS catches the first data packet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12:24:18.809609110</meta:creation-date>
    <dc:date>2026-05-03T12:24:23.426453366</dc:date>
    <meta:editing-duration>PT5S</meta:editing-duration>
    <meta:editing-cycles>1</meta:editing-cycles>
    <meta:document-statistic meta:table-count="0" meta:image-count="0" meta:object-count="0" meta:page-count="2" meta:paragraph-count="28" meta:word-count="508" meta:character-count="2884" meta:non-whitespace-character-count="2421"/>
    <meta:generator>LibreOffice/25.2.3.2$Linux_X86_64 LibreOffice_project/520$Build-2</meta:generator>
  </office:meta>
</office:document-meta>
</file>