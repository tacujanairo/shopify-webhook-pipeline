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Your Checklist to the Goal:</text:h>
      <text:list text:style-name="L1">
        <text:list-item>
          <text:p text:style-name="P1">✅ <text:span text:style-name="T1">Basic Webhook Reception</text:span> (Done!)</text:p>
        </text:list-item>
        <text:list-item>
          <text:p text:style-name="P1"><text:span text:style-name="T1">Data Validation &amp; Fallbacks</text:span> (Where we are now)</text:p>
        </text:list-item>
        <text:list-item>
          <text:p text:style-name="P1"><text:span text:style-name="T1">Connecting to MariaDB</text:span> (Saving the data locally)</text:p>
        </text:list-item>
        <text:list-item>
          <text:p text:style-name="P1"><text:span text:style-name="T1">HMAC Security</text:span> (Locking the door so only Shopify can enter)</text:p>
        </text:list-item>
        <text:list-item>
          <text:p text:style-name="P1"><text:span text:style-name="T1">External SDKs</text:span> (Sending that data to HubSpot/Airtable for real)</text:p>
        </text:list-item>
      </text:list>
      <text:p text:style-name="Standard"/>
      <text:p text:style-name="Standard"/>
      <text:p text:style-name="Standard">Shopify Webhooks</text:p>
      <text:p text:style-name="Standard"><text:s text:c="8"/>↓</text:p>
      <text:p text:style-name="Standard"><text:s/>Node.js Processor</text:p>
      <text:p text:style-name="Standard"><text:s text:c="8"/>↓</text:p>
      <text:p text:style-name="Standard">Normalization Layer</text:p>
      <text:p text:style-name="Standard"><text:s text:c="8"/>↓</text:p>
      <text:p text:style-name="Standard">MariaDB (structured tables)</text:p>
      <text:p text:style-name="Standard"><text:s text:c="8"/>↓</text:p>
      <text:p text:style-name="Standard">HubSpot / Airtable sync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1T19:29:02.679874121</meta:creation-date>
    <dc:date>2026-05-02T09:01:19.582769755</dc:date>
    <meta:editing-duration>PT9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1" meta:paragraph-count="15" meta:word-count="66" meta:character-count="422" meta:non-whitespace-character-count="343"/>
  </office:meta>
</office:document-meta>
</file>