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299cm" table:align="left"/>
    </style:style>
    <style:style style:name="Table1.A" style:family="table-column">
      <style:table-column-properties style:column-width="1.824cm"/>
    </style:style>
    <style:style style:name="Table1.B" style:family="table-column">
      <style:table-column-properties style:column-width="5.47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hort answer: <text:span text:style-name="Strong_20_Emphasis">yes — Shopify already does that.</text:span></text:p>
      <text:p text:style-name="Text_20_body">But that doesn’t make your system redundant.</text:p>
      <text:p text:style-name="Horizontal_20_Line"/>
      <text:h text:style-name="Heading_20_1" text:outline-level="1">🧠 What Shopify actually handles</text:h>
      <text:p text:style-name="Text_20_body">Inside Shopify’s own infrastructure:</text:p>
      <text:list text:style-name="L1">
        <text:list-item>
          <text:p text:style-name="P1">orders are created and stored automatically</text:p>
        </text:list-item>
        <text:list-item>
          <text:p text:style-name="P1">customers are linked internally</text:p>
        </text:list-item>
        <text:list-item>
          <text:p text:style-name="P1">order items are persisted</text:p>
        </text:list-item>
        <text:list-item>
          <text:p text:style-name="P1">inventory is updated</text:p>
        </text:list-item>
        <text:list-item>
          <text:p text:style-name="P1">everything is already queryable in their dashboard + APIs</text:p>
        </text:list-item>
      </text:list>
      <text:p text:style-name="Text_20_body">So from Shopify’s perspective:</text:p>
      <text:p text:style-name="Quotations">they already <text:span text:style-name="Emphasis">are</text:span> the system of record</text:p>
      <text:p text:style-name="Horizontal_20_Line"/>
      <text:h text:style-name="Heading_20_1" text:outline-level="1">🔥 So why do webhooks even exist?</text:h>
      <text:p text:style-name="Text_20_body">Because Shopify is the <text:span text:style-name="Strong_20_Emphasis">source of truth</text:span>, but not your system.</text:p>
      <text:p text:style-name="Text_20_body">Webhooks exist to let you:</text:p>
      <text:p text:style-name="Quotations">react to events in <text:span text:style-name="Emphasis">your own infrastructure</text:span></text:p>
      <text:p text:style-name="Horizontal_20_Line"/>
      <text:h text:style-name="Heading_20_2" text:outline-level="2">Shopify does NOT do this part:</text:h>
      <text:list text:style-name="L2">
        <text:list-item>
          <text:p text:style-name="P2">syncing to your custom database</text:p>
        </text:list-item>
        <text:list-item>
          <text:p text:style-name="P2">transforming data for your use case</text:p>
        </text:list-item>
        <text:list-item>
          <text:p text:style-name="P2">powering your own analytics system</text:p>
        </text:list-item>
        <text:list-item>
          <text:p text:style-name="P2">feeding your CMS / internal tools</text:p>
        </text:list-item>
        <text:list-item>
          <text:p text:style-name="P2">decoupling from Shopify lock-in</text:p>
        </text:list-item>
      </text:list>
      <text:p text:style-name="Text_20_body">That part is entirely on you.</text:p>
      <text:p text:style-name="Horizontal_20_Line"/>
      <text:h text:style-name="Heading_20_1" text:outline-level="1"><text:soft-page-break/>🧠 So what your pipeline really is</text:h>
      <text:p text:style-name="Text_20_body">You are not rebuilding Shopify.</text:p>
      <text:p text:style-name="Text_20_body">You are building:</text:p>
      <text:p text:style-name="P3"><text:span text:style-name="Source_20_Text">a local mirror + processing layer of Shopify events</text:span></text:p>
      <text:p text:style-name="Text_20_body">More precisely:</text:p>
      <text:p text:style-name="Quotations">Shopify = system of record<text:line-break/>Your DB = system of processing / control / extension</text:p>
      <text:p text:style-name="Horizontal_20_Line"/>
      <text:h text:style-name="Heading_20_1" text:outline-level="1">⚙️ Why your pipeline still matters (even if Shopify already has it)</text:h>
      <text:p text:style-name="Text_20_body">Because Shopify gives you:</text:p>
      <text:h text:style-name="Heading_20_2" text:outline-level="2">✔ dashboard + storage</text:h>
      <text:p text:style-name="Text_20_body">BUT NOT:</text:p>
      <text:h text:style-name="Heading_20_2" text:outline-level="2">❌ custom business logic layer</text:h>
      <text:h text:style-name="Heading_20_2" text:outline-level="2">❌ cross-platform integration</text:h>
      <text:h text:style-name="Heading_20_2" text:outline-level="2">❌ custom schema design</text:h>
      <text:h text:style-name="Heading_20_2" text:outline-level="2">❌ offline or independent analytics</text:h>
      <text:h text:style-name="Heading_20_2" text:outline-level="2">❌ decoupled system behavior</text:h>
      <text:p text:style-name="Horizontal_20_Line"/>
      <text:h text:style-name="Heading_20_1" text:outline-level="1">🧠 Simple analogy</text:h>
      <text:p text:style-name="Text_20_body">Think of it like thi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ystem</text:p>
            </table:table-cell>
            <table:table-cell table:style-name="Table1.A1" office:value-type="string">
              <text:p text:style-name="Table_20_Heading">Role</text:p>
            </table:table-cell>
          </table:table-row>
        </table:table-header-rows>
        <table:table-row>
          <table:table-cell table:style-name="Table1.A1" office:value-type="string">
            <text:p text:style-name="Table_20_Contents">Shopify</text:p>
          </table:table-cell>
          <table:table-cell table:style-name="Table1.A1" office:value-type="string">
            <text:p text:style-name="Table_20_Contents">factory (produces events)</text:p>
          </table:table-cell>
        </table:table-row>
        <table:table-row>
          <table:table-cell table:style-name="Table1.A1" office:value-type="string">
            <text:p text:style-name="Table_20_Contents">Webhook</text:p>
          </table:table-cell>
          <table:table-cell table:style-name="Table1.A1" office:value-type="string">
            <text:p text:style-name="Table_20_Contents">delivery truck</text:p>
          </table:table-cell>
        </table:table-row>
        <text:soft-page-break/>
        <table:table-row>
          <table:table-cell table:style-name="Table1.A1" office:value-type="string">
            <text:p text:style-name="Table_20_Contents">Your DB</text:p>
          </table:table-cell>
          <table:table-cell table:style-name="Table1.A1" office:value-type="string">
            <text:p text:style-name="Table_20_Contents">warehouse + processing center</text:p>
          </table:table-cell>
        </table:table-row>
      </table:table>
      <text:p text:style-name="Text_20_body">Shopify does NOT manage your warehouse logic.</text:p>
      <text:p text:style-name="Horizontal_20_Line"/>
      <text:h text:style-name="Heading_20_1" text:outline-level="1">🔥 The key insight</text:h>
      <text:p text:style-name="Text_20_body">You’re not building:</text:p>
      <text:p text:style-name="Quotations">“store incoming event”</text:p>
      <text:p text:style-name="Text_20_body">You’re building:</text:p>
      <text:p text:style-name="Quotations">“control how commerce data behaves outside Shopify”</text:p>
      <text:p text:style-name="Horizontal_20_Line"/>
      <text:h text:style-name="Heading_20_1" text:outline-level="1">⚖️ So is your schema necessary?</text:h>
      <text:p text:style-name="Text_20_body">Yes — IF your goal is:</text:p>
      <text:list text:style-name="L3">
        <text:list-item>
          <text:p text:style-name="P4">independence from Shopify UI</text:p>
        </text:list-item>
        <text:list-item>
          <text:p text:style-name="P4">custom workflows</text:p>
        </text:list-item>
        <text:list-item>
          <text:p text:style-name="P4">automation</text:p>
        </text:list-item>
        <text:list-item>
          <text:p text:style-name="P4">data ownership</text:p>
        </text:list-item>
        <text:list-item>
          <text:p text:style-name="P4">backend system design practice</text:p>
        </text:list-item>
      </text:list>
      <text:p text:style-name="Text_20_body">No — IF your goal is just:</text:p>
      <text:list text:style-name="L4">
        <text:list-item>
          <text:p text:style-name="P5">viewing orders</text:p>
        </text:list-item>
        <text:list-item>
          <text:p text:style-name="P5">basic store management</text:p>
        </text:list-item>
      </text:list>
      <text:p text:style-name="Horizontal_20_Line"/>
      <text:h text:style-name="Heading_20_1" text:outline-level="1">🧠 Final truth</text:h>
      <text:p text:style-name="Text_20_body">Shopify already solves storage.</text:p>
      <text:p text:style-name="Text_20_body">Your system solves:</text:p>
      <text:p text:style-name="Quotations"><text:span text:style-name="Strong_20_Emphasis">control, transformation, and independence from Shopify’s constraints</text:span></text:p>
      <text:p text:style-name="Horizontal_20_Line"/>
      <text:p text:style-name="Text_20_body">If you want, I can show you something important next:</text:p>
      <text:p text:style-name="Text_20_body"><text:soft-page-break/>👉 where your schema becomes <text:span text:style-name="Emphasis">better than Shopify itself</text:span> (hint: event replay + custom state machines + multi-source ingestion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2T12:23:10.195571321</meta:creation-date>
    <dc:date>2026-05-02T12:23:13.819432361</dc:date>
    <meta:editing-duration>PT4S</meta:editing-duration>
    <meta:editing-cycles>1</meta:editing-cycles>
    <meta:document-statistic meta:table-count="1" meta:image-count="0" meta:object-count="0" meta:page-count="4" meta:paragraph-count="69" meta:word-count="359" meta:character-count="2115" meta:non-whitespace-character-count="1839"/>
    <meta:generator>LibreOffice/25.2.3.2$Linux_X86_64 LibreOffice_project/520$Build-2</meta:generator>
  </office:meta>
</office:document-meta>
</file>